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3c4f" officeooo:paragraph-rsid="001e3c4f"/>
    </style:style>
    <style:style style:name="P2" style:family="paragraph" style:parent-style-name="Standard">
      <style:text-properties officeooo:rsid="001f4107" officeooo:paragraph-rsid="001f4107"/>
    </style:style>
    <style:style style:name="T1" style:family="text">
      <style:text-properties officeooo:rsid="001f9011"/>
    </style:style>
    <style:style style:name="T2" style:family="text">
      <style:text-properties officeooo:rsid="00215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pce za start, kopce za stop, kopce za brzo, kopce za nazad, koooopce za ubrzuvanje.</text:p>
      <text:p text:style-name="P1">Figuri </text:p>
      <text:p text:style-name="P1">testovi</text:p>
      <text:p text:style-name="P1"/>
      <text:p text:style-name="P2">Tuna - ANT</text:p>
      <text:p text:style-name="P2">Andrea i Mila – testovi, figuri, <text:span text:style-name="T1">kopce za brzina, kopce za nazad, nokj i den, fast forward kopce, pauza kopce, golemina na grid da si odberat igracite, </text:span><text:span text:style-name="T2">smajl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49:22.556953614</meta:creation-date>
    <dc:date>2025-02-22T17:37:25.959855217</dc:date>
    <meta:editing-duration>PT10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7" meta:character-count="267" meta:non-whitespace-character-count="223"/>
  </office:meta>
</office:document-meta>
</file>