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89032" officeooo:paragraph-rsid="00189032"/>
    </style:style>
    <style:style style:name="P2" style:family="paragraph" style:parent-style-name="Standard">
      <style:text-properties officeooo:rsid="00189032" officeooo:paragraph-rsid="0018e33e"/>
    </style:style>
    <style:style style:name="P3" style:family="paragraph" style:parent-style-name="Standard">
      <style:text-properties officeooo:rsid="0018e33e" officeooo:paragraph-rsid="0018e33e"/>
    </style:style>
    <style:style style:name="P4" style:family="paragraph" style:parent-style-name="Standard">
      <style:text-properties fo:font-size="30pt" officeooo:rsid="00189032" officeooo:paragraph-rsid="00189032" style:font-size-asian="30pt" style:font-size-complex="30pt"/>
    </style:style>
    <style:style style:name="P5" style:family="paragraph" style:parent-style-name="Standard">
      <style:paragraph-properties fo:margin-top="0.101cm" fo:margin-bottom="0.101cm" style:contextual-spacing="false"/>
      <style:text-properties officeooo:rsid="001ba8fb" officeooo:paragraph-rsid="001ba8fb"/>
    </style:style>
    <style:style style:name="T1" style:family="text">
      <style:text-properties fo:font-size="30pt" style:font-size-asian="30pt" style:font-size-complex="3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ase game</text:p>
      <text:p text:style-name="P1">We will enter the squares manually where we want</text:p>
      <text:p text:style-name="P1">We can have a random button</text:p>
      <text:p text:style-name="P1">We will add button for one step forward</text:p>
      <text:p text:style-name="P2">Start, stop, end buttons</text:p>
      <text:p text:style-name="P2">Different colours</text:p>
      <text:p text:style-name="P3">Instructions</text:p>
      <text:p text:style-name="P4">Separate parts</text:p>
      <text:p text:style-name="P1">1. Backwards 1, backwards infinity, forwards infinity</text:p>
      <text:p text:style-name="P1">2. Patterns (static, oscilators, spaceships)</text:p>
      <text:p text:style-name="P1">3. Different speed and time</text:p>
      <text:p text:style-name="P1"/>
      <text:p text:style-name="P5"><text:span text:style-name="T1">WE DONT HAVE</text:span><text:line-break/>STOP BUTTON</text:p>
      <text:p text:style-name="P5">MANUAL ENTER</text:p>
      <text:p text:style-name="P5">DIFFERENT COLOURS</text:p>
      <text:p text:style-name="P5">INSTRUCTIONS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3:49:22.556953614</meta:creation-date>
    <dc:date>2025-01-20T14:25:41.558402997</dc:date>
    <meta:editing-duration>PT5M28S</meta:editing-duration>
    <meta:editing-cycles>1</meta:editing-cycles>
    <meta:document-statistic meta:table-count="0" meta:image-count="0" meta:object-count="0" meta:page-count="1" meta:paragraph-count="15" meta:word-count="61" meta:character-count="380" meta:non-whitespace-character-count="333"/>
    <meta:generator>LibreOffice/7.3.7.2$Linux_X86_64 LibreOffice_project/30$Build-2</meta:generator>
  </office:meta>
</office:document-meta>
</file>